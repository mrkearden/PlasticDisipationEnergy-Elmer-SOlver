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9D00000272462B3899.png" manifest:media-type="image/png"/>
  <manifest:file-entry manifest:full-path="Pictures/10000000000003CA000002693CE9A351.png" manifest:media-type="image/png"/>
  <manifest:file-entry manifest:full-path="Pictures/10000000000004B7000002EBBBA6E3C7.png" manifest:media-type="image/png"/>
  <manifest:file-entry manifest:full-path="Pictures/10000000000002FC00000205703E9911.png" manifest:media-type="image/png"/>
  <manifest:file-entry manifest:full-path="Pictures/100000000000049F0000022932ACDFA9.png" manifest:media-type="image/png"/>
  <manifest:file-entry manifest:full-path="Pictures/1000000000000228000000F37CCBCCA9.png" manifest:media-type="image/png"/>
  <manifest:file-entry manifest:full-path="Pictures/10000000000004D400000050AF191639.png" manifest:media-type="image/png"/>
  <manifest:file-entry manifest:full-path="Pictures/10000000000006240000033E57FC14AC.png" manifest:media-type="image/png"/>
  <manifest:file-entry manifest:full-path="Pictures/10000000000003480000028E33F25F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2a45" officeooo:paragraph-rsid="00192a45"/>
    </style:style>
    <style:style style:name="P2" style:family="paragraph" style:parent-style-name="Standard">
      <style:paragraph-properties fo:text-align="start" style:justify-single-word="false"/>
      <style:text-properties officeooo:rsid="00192a45" officeooo:paragraph-rsid="00192a45"/>
    </style:style>
    <style:style style:name="P3" style:family="paragraph" style:parent-style-name="Standard">
      <style:paragraph-properties fo:text-align="start" style:justify-single-word="false"/>
      <style:text-properties officeooo:rsid="00195054" officeooo:paragraph-rsid="00195054"/>
    </style:style>
    <style:style style:name="P4" style:family="paragraph" style:parent-style-name="Standard">
      <style:paragraph-properties fo:text-align="start" style:justify-single-word="false"/>
      <style:text-properties officeooo:rsid="00197b29" officeooo:paragraph-rsid="00197b29"/>
    </style:style>
    <style:style style:name="P5" style:family="paragraph" style:parent-style-name="Standard">
      <style:paragraph-properties fo:text-align="start" style:justify-single-word="false"/>
      <style:text-properties officeooo:rsid="001b3eb8" officeooo:paragraph-rsid="001b3e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stic Deformation Energy UMAT</text:p>
      <text:p text:style-name="P1"><draw:frame draw:style-name="fr1" draw:name="Image1" text:anchor-type="char" svg:x="0.0839in" svg:y="0.0909in" svg:width="6.9252in" svg:height="5.3909in" draw:z-index="0"><draw:image xlink:href="Pictures/10000000000003480000028E33F25FE1.png" xlink:type="simple" xlink:show="embed" xlink:actuate="onLoad" draw:mime-type="image/png"/></draw:frame></text:p>
      <text:p text:style-name="P1"><draw:frame draw:style-name="fr1" draw:name="Image2" text:anchor-type="char" svg:x="0.6299in" svg:y="0.0701in" svg:width="5.75in" svg:height="2.5311in" draw:z-index="1"><draw:image xlink:href="Pictures/1000000000000228000000F37CCBCC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Example Problem</text:p>
      <text:p text:style-name="P2">A 1 x 1 x 1 steel block is put into uniaxial tension by restraining one end a displacing the other end as a function of time. <text:s/>E = 200000.0, v = 0.30, the plastic model is perfectly plastic at a yield stress of 220.0. <text:s/>The material density is 7850. and the specific heat capacity Cp = 470.</text:p>
      <text:p text:style-name="P2"/>
      <text:p text:style-name="P2">A spreadsheet was developed to calculate the close formed solution to provide a test case.</text:p>
      <text:p text:style-name="P2"/>
      <text:p text:style-name="P1"><draw:frame draw:style-name="fr1" draw:name="Image3" text:anchor-type="char" svg:x="0in" svg:y="0.0409in" svg:width="6.9252in" svg:height="3.2366in" draw:z-index="2"><draw:image xlink:href="Pictures/100000000000049F0000022932ACDFA9.png" xlink:type="simple" xlink:show="embed" xlink:actuate="onLoad" draw:mime-type="image/png"/></draw:frame></text:p>
      <text:p text:style-name="P3">The unit block Displacement and stress </text:p>
      <text:p text:style-name="P3"/>
      <text:p text:style-name="P1"><draw:frame draw:style-name="fr1" draw:name="Image4" text:anchor-type="char" svg:x="0.1256in" svg:y="0.0472in" svg:width="5.4535in" svg:height="3.6902in" draw:z-index="3"><draw:image xlink:href="Pictures/10000000000002FC00000205703E99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0701in" svg:y="0.122in" svg:width="6.9252in" svg:height="3.6563in" draw:z-index="4"><draw:image xlink:href="Pictures/10000000000006240000033E57FC14AC.png" xlink:type="simple" xlink:show="embed" xlink:actuate="onLoad" draw:mime-type="image/png"/></draw:frame><text:soft-page-break/></text:p>
      <text:p text:style-name="P3">The comparison of the Elmer solution with the UMAT</text:p>
      <text:p text:style-name="P3"><draw:frame draw:style-name="fr1" draw:name="Image6" text:anchor-type="char" svg:x="0in" svg:y="0.128in" svg:width="6.9252in" svg:height="0.448in" draw:z-index="5"><draw:image xlink:href="Pictures/10000000000004D400000050AF191639.png" xlink:type="simple" xlink:show="embed" xlink:actuate="onLoad" draw:mime-type="image/png"/></draw:frame></text:p>
      <text:p text:style-name="P3">The material input for the UMAT is as follows</text:p>
      <text:p text:style-name="P3"/>
      <text:p text:style-name="P3">Material 1</text:p>
      <text:p text:style-name="P3"><text:s text:c="2"/>Number of Material Constants = Integer <text:s/>8</text:p>
      <text:p text:style-name="P3"><text:s text:c="2"/>Number of State Variables = Integer 0</text:p>
      <text:p text:style-name="P3"><text:s text:c="2"/>! List material constants as {Young's modulus, Poisson's ratio,Hardening Slope, Yield, density, Cp,beta, npt, Tsteps, Eout}:</text:p>
      <text:p text:style-name="P3"><text:s text:c="2"/>Material Constants(8) = Real 200000.0 0.30 0.1 220.0 7850 470 0.90 2</text:p>
      <text:p text:style-name="P3"><text:s text:c="2"/>UMAT Subroutine = File "PDEUmat" "plastic"</text:p>
      <text:p text:style-name="P3"><text:s text:c="2"/>Name = "plastic" <text:s/>! This specifies the CMNAME argument of UMAT</text:p>
      <text:p text:style-name="P3">End</text:p>
      <text:p text:style-name="P3">The last parameter Eout limits the printed data to 1 selected element, the point of interest where yielding is occurring. <text:s/>This is done to limit the size of the file. <text:s/>The data is calculated for all elements, but unless it is a very small model, printed output would be too large. <text:s/></text:p>
      <text:p text:style-name="P3"/>
      <text:p text:style-name="P3">A future upgrade could be to add VTU outpu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lots of time histories from output file</text:p>
      <text:p text:style-name="P4"><draw:frame draw:style-name="fr2" draw:name="Image7" text:anchor-type="char" svg:width="6.9252in" svg:height="4.4047in" draw:z-index="6"><draw:image xlink:href="Pictures/10000000000003CA000002693CE9A351.png" xlink:type="simple" xlink:show="embed" xlink:actuate="onLoad" draw:mime-type="image/png"/></draw:frame>The UMAT was testing on a 2D notched beam model</text:p>
      <text:p text:style-name="P4"><draw:frame draw:style-name="fr2" draw:name="Image8" text:anchor-type="char" svg:width="6.9252in" svg:height="3.0165in" draw:z-index="7"><draw:image xlink:href="Pictures/100000000000059D00000272462B389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Notch Beam Graphs</text:p>
      <text:p text:style-name="P4"/>
      <text:p text:style-name="P4"/>
      <text:p text:style-name="P5"><draw:frame draw:style-name="fr1" draw:name="Image9" text:anchor-type="char" svg:x="0in" svg:y="0.1752in" svg:width="6.9252in" svg:height="4.2854in" draw:z-index="8"><draw:image xlink:href="Pictures/10000000000004B7000002EBBBA6E3C7.png" xlink:type="simple" xlink:show="embed" xlink:actuate="onLoad" draw:mime-type="image/png"/></draw:frame></text:p>
      <text:p text:style-name="P5"/>
      <text:p text:style-name="P5">UMAT and test case can be found at</text:p>
      <text:p text:style-name="P5"/>
      <text:p text:style-name="P5"><text:a xlink:type="simple" xlink:href="https://github.com/mrkearden/PlasticDisipationEnergy-Elmer-SOlver" text:style-name="Internet_20_link" text:visited-style-name="Visited_20_Internet_20_Link">https://github.com/mrkearden/PlasticDisipationEnergy-Elmer-SOlver</text:a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4T07:11:23.991485510</meta:creation-date>
    <meta:generator>LibreOffice/24.2.7.2$Linux_X86_64 LibreOffice_project/420$Build-2</meta:generator>
    <dc:date>2026-06-04T07:32:54.834507353</dc:date>
    <meta:editing-duration>PT10M42S</meta:editing-duration>
    <meta:editing-cycles>3</meta:editing-cycles>
    <meta:document-statistic meta:table-count="0" meta:image-count="9" meta:object-count="0" meta:page-count="5" meta:paragraph-count="22" meta:word-count="254" meta:character-count="1487" meta:non-whitespace-character-count="1234"/>
  </office:meta>
</office:document-meta>
</file>